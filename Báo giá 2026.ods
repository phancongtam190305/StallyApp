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ó hà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21:40:17.257029389</meta:creation-date>
    <dc:date>2026-06-16T21:40:36.342819933</dc:date>
    <meta:editing-duration>PT20S</meta:editing-duration>
    <meta:editing-cycles>1</meta:editing-cycles>
    <meta:document-statistic meta:table-count="1" meta:cell-count="1" meta:object-count="0"/>
    <meta:generator>LibreOffice/25.8.7.3$Linux_X86_64 LibreOffice_project/580$Build-3</meta:generator>
  </office:meta>
</office:document-meta>
</file>